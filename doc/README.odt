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2cm" fo:line-height="114%"/>
      <style:text-properties style:font-name="Google Sans Text"/>
    </style:style>
    <style:style style:name="P2" style:family="paragraph" style:parent-style-name="Text_20_body" style:list-style-name="L1">
      <style:paragraph-properties fo:margin-top="0cm" fo:margin-bottom="0.212cm" fo:line-height="114%"/>
      <style:text-properties style:font-name="Google Sans Text"/>
    </style:style>
    <style:style style:name="P3" style:family="paragraph" style:parent-style-name="Heading_20_3">
      <style:paragraph-properties fo:margin-top="0cm" fo:margin-bottom="0.212cm" fo:line-height="114%"/>
      <style:text-properties style:font-name="Google Sans"/>
    </style:style>
    <style:style style:name="P4" style:family="paragraph" style:parent-style-name="Heading_20_2">
      <style:text-properties style:font-name="Google Sans"/>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WEBRI-3.0: Bridge Tournament Management System</text:h>
      <text:p text:style-name="P1"><text:bookmark text:name="p-rc_2ff67e31c5746934-153"/>WEBRI-3.0 is a web-based, integrated management system designed for Howell and Mitchell pair Bridge tournaments. Built using HTML/PHP, JavaScript, and a MySQL database, it is accessible from any device with a browser and internet connection, ensuring flexibility for organizers and players alike. </text:p>
      <text:h text:style-name="P3" text:outline-level="3">Key Features</text:h>
      <text:list xml:id="list8496931115959597228" text:style-name="L1">
        <text:list-item>
          <text:p text:style-name="P2"><text:bookmark text:name="p-rc_2ff67e31c5746934-154"/><text:span text:style-name="T1">Administration Module:</text:span> Password-protected tools to create, manage, and monitor tournaments. Key functions include managing registrations, generating tournament rounds, inputting director-awarded scores, and publishing real-time rankings. The system also includes advanced, proprietary Howell movement tables that optimize board rotation and player movement, alongside a "Reorder Registrants" feature to balance field strength based on player ratings. </text:p>
        </text:list-item>
        <text:list-item>
          <text:p text:style-name="P2"><text:bookmark text:name="p-rc_2ff67e31c5746934-155"/><text:span text:style-name="T1">Registration Module:</text:span> Allows participants to view tournament lists, register as a pair, or sign up as an individual seeking a partner. </text:p>
        </text:list-item>
        <text:list-item>
          <text:p text:style-name="P2"><text:bookmark text:name="p-rc_2ff67e31c5746934-156"/><text:span text:style-name="T1">Game Module:</text:span> Designed for use at the table via tablets or smartphones. It enables players (typically in the South position) to input contracts, tricks, and opening leads, track round progress, and view instant score calculations. It also provides visual feedback on hand analysis and tournament progress, with support for paper-based score manual entry when needed. </text:p>
        </text:list-item>
      </text:list>
      <text:p text:style-name="P1"><text:bookmark text:name="p-rc_2ff67e31c5746934-157"/>WEBRI-3.0 supports multiple scoring systems—including MP, IMP, POM, and DMP—and keeps all closed tournaments permanently archived for future consultat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Orsucci</meta:initial-creator>
    <meta:creation-date>2026-06-24T16:11:20.13</meta:creation-date>
    <meta:document-statistic meta:table-count="0" meta:image-count="0" meta:object-count="0" meta:page-count="1" meta:paragraph-count="7" meta:word-count="201" meta:character-count="1464"/>
    <dc:date>2026-06-24T16:13:45.52</dc:date>
    <dc:creator>Antonio Orsucci</dc:creator>
    <meta:editing-duration>PT2M25S</meta:editing-duration>
    <meta:editing-cycles>1</meta:editing-cycles>
    <meta:generator>OpenOffice/4.1.8$Win32 OpenOffice.org_project/418m3$Build-9803</meta:generator>
  </office:meta>
</office:document-meta>
</file>