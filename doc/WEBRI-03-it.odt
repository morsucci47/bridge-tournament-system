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WEBRI-3.0</text:h>
      <text:p text:style-name="Standard"/>
      <text:p text:style-name="Standard">Webri è un sistema integrato di gestione di tornei di Bridge a coppie Howell e Mitchell.</text:p>
      <text:p text:style-name="Standard">Il programma risiede su server, è scritto in HTML/PHP e JS e si appoggia su database MySql.</text:p>
      <text:p text:style-name="Standard">I files e le istruzioni di installazione sono disponibili su GitHub.</text:p>
      <text:p text:style-name="Standard">Il programma è utilizzabile da ogni computer, tablet <text:s/>o smartphone dotati di browser e accesso a internet.</text:p>
      <text:p text:style-name="P3">Modulo di amministrazione</text:p>
      <text:p text:style-name="Standard">Accedendo al modulo di <text:span text:style-name="T3">amministrazione</text:span>, protetto da password, si può:</text:p>
      <text:p text:style-name="Standard"/>
      <text:list xml:id="list125637642348829298" text:style-name="L1">
        <text:list-item>
          <text:p text:style-name="P4">Aprire/modificare tornei definendo tipologia, numero di turni, n. boards per turno e data di inizio</text:p>
        </text:list-item>
        <text:list-item>
          <text:p text:style-name="P4">Vedere la lista delle coppie iscritte ed, eventualmente, fare delle modifche.</text:p>
        </text:list-item>
        <text:list-item>
          <text:p text:style-name="P4">Dare inizio al torneo generando il primo turno e stamparlo.</text:p>
        </text:list-item>
        <text:list-item>
          <text:p text:style-name="P4">Controllare l'inserimento dei risultati ed, eventualmente, modificarli o inserire risultati arbitrali.</text:p>
        </text:list-item>
        <text:list-item>
          <text:p text:style-name="P4">Generare e stampare la classifica, anche parziale.</text:p>
        </text:list-item>
        <text:list-item>
          <text:p text:style-name="P4">Controllare i dettagli dei risultati (punteggi, percentuali, contratti, attacchi) per board e per coppia.</text:p>
        </text:list-item>
        <text:list-item>
          <text:p text:style-name="P4">Controllare gli scores per ogni Borard.</text:p>
        </text:list-item>
        <text:list-item>
          <text:p text:style-name="P4">Controllare i tempi impiegati dai giocatori per ogni mano.</text:p>
        </text:list-item>
        <text:list-item>
          <text:p text:style-name="P4">Vedere le immagini dei boards ove si sia optato per la foto delle mani.</text:p>
        </text:list-item>
        <text:list-item>
          <text:p text:style-name="P4">Vedere lo schema delle mani con relativa analisi Double-Dummy, ove si sia optato per l' editing delle mani.</text:p>
        </text:list-item>
        <text:list-item>
          <text:p text:style-name="P4">Cancellare l'ultimo turno.</text:p>
        </text:list-item>
        <text:list-item>
          <text:p text:style-name="P4">Cancellare un torneo.</text:p>
        </text:list-item>
        <text:list-item>
          <text:p text:style-name="P4">Chiudere un torneo, congelando i risultati.</text:p>
        </text:list-item>
      </text:list>
      <text:p text:style-name="Standard">Le funzionalità ausiliare: “<text:span text:style-name="T1">Forza nuovo turno</text:span>” e “<text:span text:style-name="T1">Inserimento manuale</text:span>” sono pensate per consentire l'uso di questo programma anche con dati raccolti tramite scores cartacei.</text:p>
      <text:p text:style-name="Standard">Ogni torneo chiuso rimane archiviato nel data-base e può sempre essere consultato o anche riaperto.</text:p>
      <text:p text:style-name="Standard">Il programma fa uso di tabelle dei movimenti Howell avanzate e proprietarie che tengono conto della rotazione ordinata dei boards ai tavoli, del minimo spostamento dei giocatori e del bilanciamento ottimale delle coppie per ogni mano. Per sfruttare questa ultima proprietà è stata inserita nel programma la funzionalità “<text:span text:style-name="T1">Riordina Iscritti</text:span>”. Con questa le coppie iscritte vengono riordinate secondo il loro rating e di conseguenza la forza media dei giocatori <text:s/>sulle due linee risulta esattamente bilanciata.</text:p>
      <text:list xml:id="list35787791" text:continue-numbering="true" text:style-name="L1">
        <text:list-header>
          <text:p text:style-name="P4"/>
        </text:list-header>
      </text:list>
      <text:p text:style-name="P3">Modulo di iscrizione</text:p>
      <text:p text:style-name="Standard">Accedendo al modulo di <text:span text:style-name="T3">iscrizione</text:span> si può:</text:p>
      <text:p text:style-name="Standard"/>
      <text:list xml:id="list5652895745956217163" text:style-name="L2">
        <text:list-item>
          <text:p text:style-name="P5">Selezionare il torneo a cui si vuole partecipare.</text:p>
        </text:list-item>
        <text:list-item>
          <text:p text:style-name="P5">Controllare la lista degli iscritti.</text:p>
        </text:list-item>
        <text:list-item>
          <text:p text:style-name="P5">Iscrivere una coppia.</text:p>
        </text:list-item>
        <text:list-item>
          <text:p text:style-name="P5">Cancellare una coppia. </text:p>
        </text:list-item>
      </text:list>
      <text:p text:style-name="Standard">Ci si può iscrivere singolarmente inserendo un “*” al posto del secondo nome.</text:p>
      <text:p text:style-name="Standard">Chi vuole abbinarsi al singolo può inserire il proprio nome al posto dell'asterisco.</text:p>
      <text:list xml:id="list35792538" text:continue-numbering="true" text:style-name="L2">
        <text:list-header>
          <text:p text:style-name="P5"/>
        </text:list-header>
      </text:list>
      <text:p text:style-name="P3"><text:soft-page-break/>Modulo di gioco</text:p>
      <text:p text:style-name="Standard">All' inizio del torneo su ogni tavolo deve essere disponibile un tablet/cellulare predisposto per il torneo in corso e il numero di tavolo. Il modulo di <text:span text:style-name="T3">gioco</text:span> <text:s/>consente al giocatore che lo utilizza, solitamente quello posizionato in SUD di effettuare le seguenti operazioni: <text:s/></text:p>
      <text:p text:style-name="Standard"/>
      <text:list xml:id="list5344726126626140098" text:style-name="L3">
        <text:list-item>
          <text:p text:style-name="P6">Vedere le informazioni relative a</text:p>
        </text:list-item>
      </text:list>
      <text:p text:style-name="Standard"><text:tab/>numero del turno</text:p>
      <text:p text:style-name="Standard"><text:tab/>tavolo</text:p>
      <text:p text:style-name="Standard"><text:tab/>avversari</text:p>
      <text:p text:style-name="Standard"><text:tab/>boards da giocare</text:p>
      <text:p text:style-name="Standard"><text:tab/>linea di gioco</text:p>
      <text:list xml:id="list1401450197327475863" text:style-name="L4">
        <text:list-item>
          <text:p text:style-name="P7">Cliccando sul numero del board giocato, può inserire i dati relativi a</text:p>
          <text:p text:style-name="P7">contratto (eventualmente contrato o surcontrato)</text:p>
          <text:p text:style-name="P7">chi lo gioca</text:p>
          <text:p text:style-name="P7">n. di prese fatte in più o in meno</text:p>
          <text:p text:style-name="P7">attacco</text:p>
        </text:list-item>
        <text:list-item>
          <text:p text:style-name="P7">Calcolare gli scores e accettarli.</text:p>
        </text:list-item>
        <text:list-item>
          <text:p text:style-name="P7">Fotografare o meglio editare la mano, per eseguire controlli e analisi.</text:p>
        </text:list-item>
        <text:list-item>
          <text:p text:style-name="P7">Controllare i risultati precedenti sugli altri tavoli.</text:p>
        </text:list-item>
        <text:list-item>
          <text:p text:style-name="P7">Vedere lo spostamento da effettuare al turno successivo.</text:p>
        </text:list-item>
      </text:list>
      <text:p text:style-name="Standard"/>
      <text:p text:style-name="Standard">Quando viene registrato l'ultimo score del turno, un messaggio scritto e vocale avverte che il turno è finito. Tutti devono premere sul tasto “<text:span text:style-name="T1">Aggiorna/Controlla</text:span>” per aggionare i dati della pagina.</text:p>
      <text:p text:style-name="Standard"/>
      <text:p text:style-name="Standard">Al termine del torneo sono resi disponibili i pulsanti che consentono di:</text:p>
      <text:p text:style-name="Standard"/>
      <text:list xml:id="list220081064518685290" text:style-name="L5">
        <text:list-item>
          <text:p text:style-name="P8">Vedere la classifica.</text:p>
        </text:list-item>
        <text:list-item>
          <text:p text:style-name="P8">Vedere gli scores per ogni board..</text:p>
        </text:list-item>
      </text:list>
      <text:list xml:id="list4843795385904447212" text:style-name="L6">
        <text:list-item>
          <text:p text:style-name="P9">Controllare tutti i risultati parziali per ogni coppia e per ogni board, in modo sintetico.</text:p>
        </text:list-item>
        <text:list-item>
          <text:p text:style-name="P9">Vedere le eventuali foto fatte alle mani</text:p>
        </text:list-item>
        <text:list-item>
          <text:p text:style-name="P9">Vedere gli schemi delle boards editate e le relative analisi.</text:p>
        </text:list-item>
        <text:list-item>
          <text:p text:style-name="P9">Vedere i tempi impiegati per giocare le mani, turno per turno.</text:p>
          <text:p text:style-name="P9"/>
        </text:list-item>
      </text:list>
      <text:p text:style-name="Standard">Il modulo di gioco, oltre a consentire l' accesso al torneo in corso, <text:s/>permette anche di <text:s/>vedere i dati di tutti i tornei archiviati. </text:p>
      <text:p text:style-name="Standard"/>
      <text:p text:style-name="Standard"/>
      <text:p text:style-name="Standard"><text:span text:style-name="T1">Nota sul tipo di punteggio</text:span> </text:p>
      <text:p text:style-name="Standard">In fase di definizione del torneo si specifica il tipo di punteggio adottato.</text:p>
      <text:p text:style-name="Standard"/>
      <text:p text:style-name="P1">MP: <text:tab/><text:span text:style-name="T2">percentuale</text:span> <text:span text:style-name="T2">dei Match Points rispetto al massimo teorico.</text:span></text:p>
      <text:p text:style-name="P1">IMP:<text:span text:style-name="T2"> <text:tab/>International Match Points</text:span></text:p>
      <text:p text:style-name="P1">POM<text:span text:style-name="T2">: <text:s/>Points Of Merit (o Voti)</text:span></text:p>
      <text:p text:style-name="P1"><text:span text:style-name="T2"><text:s text:c="5"/>vedi </text:span><text:a xlink:type="simple" xlink:href="http://www.lamongolfiera.mb.it/wp-content/uploads/2019/05/Punteggio-di-merito1.pdf" text:style-name="Internet_20_link" text:visited-style-name="Visited_20_Internet_20_Link"><text:span text:style-name="T2">http://www.lamongolfiera.mb.it/wp-content/uploads/2019/05/Punteggio-di-merito1.pdf</text:span></text:a><text:span text:style-name="T2">)</text:span></text:p>
      <text:p text:style-name="P1">DMP:<text:span text:style-name="T2"> <text:s/>Distributional Match Points</text:span></text:p>
      <text:p text:style-name="P1"><text:span text:style-name="T2"><text:s text:c="5"/>vedi </text:span><text:a xlink:type="simple" xlink:href="http://www.lamongolfiera.mb.it/wp-content/uploads/2021/12/Il-punteggio-nel-bridgeR2.pdf" text:style-name="Internet_20_link" text:visited-style-name="Visited_20_Internet_20_Link"><text:span text:style-name="T2">http://www.lamongolfiera.mb.it/wp-content/uploads/2021/12/Il-punteggio-nel-bridgeR2.pdf</text:span></text:a></text:p>
      <text:p text:style-name="P2"/>
      <text:p text:style-name="P2">In questa release <text:s/>i giocatori possono visualizzare la classifica in base a tutti e quattro questi criteri ma nella prossima potranno vedere solo quella definita dal Direttore del torne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2cm" fo:margin-bottom="1.73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Orsucci</meta:initial-creator>
    <meta:creation-date>2021-12-14T17:47:10.15</meta:creation-date>
    <dc:date>2026-06-24T15:51:12.02</dc:date>
    <dc:creator>Antonio Orsucci</dc:creator>
    <meta:editing-duration>PT16H8S</meta:editing-duration>
    <meta:editing-cycles>19</meta:editing-cycles>
    <meta:generator>OpenOffice/4.1.8$Win32 OpenOffice.org_project/418m3$Build-9803</meta:generator>
    <meta:document-statistic meta:table-count="0" meta:image-count="0" meta:object-count="0" meta:page-count="2" meta:paragraph-count="66" meta:word-count="719" meta:character-count="4604"/>
  </office:meta>
</office:document-meta>
</file>