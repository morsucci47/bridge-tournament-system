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5">
      <style:paragraph-properties fo:margin-left="-0.026cm" fo:margin-right="0cm" fo:margin-top="0cm" fo:margin-bottom="0cm" fo:line-height="114%" fo:orphans="2" fo:widows="2" fo:text-indent="1.085cm" style:auto-text-indent="false" fo:padding="0cm" fo:border="none"/>
      <style:text-properties fo:color="#1f1f1f" style:font-name="Google Sans Text" fo:font-weight="bold" style:font-weight-asian="bold" style:font-weight-complex="bold"/>
    </style:style>
    <style:style style:name="P2" style:family="paragraph" style:parent-style-name="Text_20_body">
      <style:paragraph-properties fo:margin-left="0cm" fo:margin-right="0cm" fo:margin-top="0cm" fo:margin-bottom="0cm" fo:line-height="114%" fo:orphans="2" fo:widows="2" fo:text-indent="0cm" style:auto-text-indent="false" fo:padding="0cm" fo:border="none"/>
      <style:text-properties fo:color="#1f1f1f" style:font-name="Google Sans Text"/>
    </style:style>
    <style:style style:name="P3" style:family="paragraph" style:parent-style-name="Text_20_body">
      <style:paragraph-properties fo:margin-left="0cm" fo:margin-right="0cm" fo:margin-top="0cm" fo:margin-bottom="0cm" fo:line-height="114%" fo:text-align="center" style:justify-single-word="false" fo:orphans="2" fo:widows="2" fo:text-indent="0cm" style:auto-text-indent="false" fo:padding="0cm" fo:border="none"/>
      <style:text-properties fo:color="#1f1f1f" style:font-name="Google Sans Text" fo:font-weight="bold"/>
    </style:style>
    <style:style style:name="P4" style:family="paragraph" style:parent-style-name="Text_20_body">
      <style:paragraph-properties fo:margin-left="-0.026cm" fo:margin-right="0cm" fo:margin-top="0cm" fo:margin-bottom="0cm" fo:line-height="114%" fo:orphans="2" fo:widows="2" fo:text-indent="0cm" style:auto-text-indent="false" fo:padding="0cm" fo:border="none"/>
      <style:text-properties fo:color="#1f1f1f" style:font-name="Google Sans Text"/>
    </style:style>
    <style:style style:name="P5" style:family="paragraph" style:parent-style-name="Text_20_body">
      <style:paragraph-properties fo:margin-left="-0.026cm" fo:margin-right="0cm" fo:margin-top="0cm" fo:margin-bottom="0cm" fo:line-height="114%" fo:orphans="2" fo:widows="2" fo:text-indent="1.164cm" style:auto-text-indent="false" fo:padding="0cm" fo:border="none"/>
      <style:text-properties fo:color="#1f1f1f" style:font-name="Google Sans Text"/>
    </style:style>
    <style:style style:name="P6" style:family="paragraph" style:parent-style-name="Text_20_body" style:list-style-name="L1">
      <style:paragraph-properties fo:margin-left="-0.026cm" fo:margin-right="0cm" fo:margin-top="0cm" fo:margin-bottom="0cm" fo:line-height="114%" fo:orphans="2" fo:widows="2" fo:text-indent="1.164cm" style:auto-text-indent="false" fo:padding="0cm" fo:border="none"/>
      <style:text-properties fo:color="#1f1f1f" style:font-name="Google Sans Text"/>
    </style:style>
    <style:style style:name="P7" style:family="paragraph" style:parent-style-name="Text_20_body" style:list-style-name="L1" style:master-page-name="">
      <style:paragraph-properties fo:margin-left="-0.026cm" fo:margin-right="0cm" fo:margin-top="0cm" fo:margin-bottom="0cm" fo:line-height="114%" fo:orphans="2" fo:widows="2" fo:text-indent="1.164cm" style:auto-text-indent="false" style:page-number="auto" fo:padding="0cm" fo:border="none"/>
      <style:text-properties fo:color="#1f1f1f" style:font-name="Google Sans Text"/>
    </style:style>
    <style:style style:name="P8" style:family="paragraph" style:parent-style-name="Text_20_body" style:list-style-name="L2" style:master-page-name="">
      <style:paragraph-properties fo:margin-left="0cm" fo:margin-right="0cm" fo:margin-top="0cm" fo:margin-bottom="0cm" fo:line-height="114%" fo:orphans="2" fo:widows="2" fo:text-indent="1.032cm" style:auto-text-indent="false" style:page-number="auto" fo:padding="0cm" fo:border="none"/>
      <style:text-properties fo:color="#1f1f1f" style:font-name="Google Sans Text"/>
    </style:style>
    <style:style style:name="P9" style:family="paragraph" style:parent-style-name="Text_20_body" style:list-style-name="L2">
      <style:paragraph-properties fo:margin-left="0cm" fo:margin-right="0cm" fo:margin-top="0cm" fo:margin-bottom="0cm" fo:line-height="114%" fo:orphans="2" fo:widows="2" fo:text-indent="1.032cm" style:auto-text-indent="false" fo:padding="0cm" fo:border="none"/>
      <style:text-properties fo:color="#1f1f1f" style:font-name="Google Sans Text"/>
    </style:style>
    <style:style style:name="P10" style:family="paragraph" style:parent-style-name="Text_20_body">
      <style:paragraph-properties fo:margin-left="0cm" fo:margin-right="0cm" fo:margin-top="0cm" fo:margin-bottom="0cm" fo:line-height="114%" fo:orphans="2" fo:widows="2" fo:text-indent="0.979cm" style:auto-text-indent="false" fo:padding="0cm" fo:border="none"/>
      <style:text-properties fo:color="#1f1f1f" style:font-name="Google Sans Text"/>
    </style:style>
    <style:style style:name="P11" style:family="paragraph" style:parent-style-name="Text_20_body" style:list-style-name="L3">
      <style:paragraph-properties fo:margin-left="0cm" fo:margin-right="0cm" fo:margin-top="0cm" fo:margin-bottom="0cm" fo:line-height="114%" fo:orphans="2" fo:widows="2" fo:text-indent="0.979cm" style:auto-text-indent="false" fo:padding="0cm" fo:border="none"/>
      <style:text-properties fo:color="#1f1f1f" style:font-name="Google Sans Text"/>
    </style:style>
    <style:style style:name="P12" style:family="paragraph" style:parent-style-name="Text_20_body" style:list-style-name="L4">
      <style:paragraph-properties fo:margin-left="0cm" fo:margin-right="0cm" fo:margin-top="0cm" fo:margin-bottom="0cm" fo:line-height="114%" fo:orphans="2" fo:widows="2" fo:text-indent="0.979cm" style:auto-text-indent="false" fo:padding="0cm" fo:border="none"/>
      <style:text-properties fo:color="#1f1f1f" style:font-name="Google Sans Text"/>
    </style:style>
    <style:style style:name="P13" style:family="paragraph" style:parent-style-name="Text_20_body" style:list-style-name="L3" style:master-page-name="">
      <style:paragraph-properties fo:margin-left="0cm" fo:margin-right="0cm" fo:margin-top="0cm" fo:margin-bottom="0cm" fo:line-height="114%" fo:orphans="2" fo:widows="2" fo:text-indent="0.979cm" style:auto-text-indent="false" style:page-number="auto" fo:padding="0cm" fo:border="none"/>
      <style:text-properties fo:color="#1f1f1f" style:font-name="Google Sans Text"/>
    </style:style>
    <style:style style:name="P14" style:family="paragraph" style:parent-style-name="Text_20_body" style:list-style-name="L5">
      <style:paragraph-properties fo:margin-left="-0.026cm" fo:margin-right="0cm" fo:margin-top="0cm" fo:margin-bottom="0cm" fo:line-height="114%" fo:orphans="2" fo:widows="2" fo:text-indent="1.085cm" style:auto-text-indent="false" fo:padding="0cm" fo:border="none"/>
      <style:text-properties fo:color="#1f1f1f" style:font-name="Google Sans Text"/>
    </style:style>
    <style:style style:name="P15" style:family="paragraph" style:parent-style-name="Text_20_body" style:list-style-name="L5" style:master-page-name="">
      <style:paragraph-properties fo:margin-left="-0.026cm" fo:margin-right="0cm" fo:margin-top="0cm" fo:margin-bottom="0cm" fo:line-height="114%" fo:orphans="2" fo:widows="2" fo:text-indent="1.085cm" style:auto-text-indent="false" style:page-number="auto" fo:padding="0cm" fo:border="none"/>
      <style:text-properties fo:color="#1f1f1f" style:font-name="Google Sans Text"/>
    </style:style>
    <style:style style:name="P16" style:family="paragraph" style:parent-style-name="Text_20_body" style:list-style-name="L5" style:master-page-name="">
      <style:paragraph-properties fo:margin-left="-0.026cm" fo:margin-right="-0.265cm" fo:margin-top="0cm" fo:margin-bottom="0cm" fo:line-height="114%" fo:orphans="2" fo:widows="2" fo:text-indent="1.085cm" style:auto-text-indent="false" style:page-number="auto" fo:padding="0cm" fo:border="none"/>
      <style:text-properties fo:color="#1f1f1f" style:font-name="Google Sans Text"/>
    </style:style>
    <style:style style:name="P17" style:family="paragraph" style:parent-style-name="Heading_20_3">
      <style:paragraph-properties fo:margin-left="0cm" fo:margin-right="0cm" fo:margin-top="0cm" fo:margin-bottom="0cm" fo:line-height="114%" fo:text-align="center" style:justify-single-word="false" fo:orphans="2" fo:widows="2" fo:text-indent="0cm" style:auto-text-indent="false" fo:padding="0cm" fo:border="none"/>
      <style:text-properties fo:color="#1f1f1f" style:font-name="Google San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writing-mode="lr-tb" fo:margin-left="0cm" fo:margin-right="-0.303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section text:style-name="Sect1" text:name="model-response-message-contentr_74cc8a237f4b817f">
        <text:p text:style-name="P3">WEBRI-3.0</text:p>
        <text:p text:style-name="P2"><text:bookmark text:name="p-rc_45b7257020054464-63"/>Webri is an integrated management system for Howell and Mitchell pair Bridge tournaments. The program resides on a server, is written in HTML/PHP and JS, and uses a MySQL database. Installation files and instructions are available on GitHub. The program can be used from any computer, tablet, or smartphone equipped with a browser and internet access. </text:p>
        <text:h text:style-name="P17" text:outline-level="3">Administration Module</text:h>
        <text:p text:style-name="P2"/>
        <text:p text:style-name="P2">By accessing the password-protected administrator module, you can:</text:p>
        <text:list xml:id="list2204681108826373366" text:style-name="L1">
          <text:list-item>
            <text:p text:style-name="P7"><text:bookmark text:name="p-rc_45b7257020054464-64"/>Open/modify tournaments by defining the type, number of rounds, number of boards <text:tab/>per round, and start date. </text:p>
          </text:list-item>
          <text:list-item>
            <text:p text:style-name="P6"><text:bookmark text:name="p-rc_45b7257020054464-65"/>View the list of registered pairs and, if necessary, make changes. </text:p>
          </text:list-item>
          <text:list-item>
            <text:p text:style-name="P6"><text:bookmark text:name="p-rc_45b7257020054464-66"/>start the tournament generating the first round and print it. </text:p>
          </text:list-item>
          <text:list-item>
            <text:p text:style-name="P6"><text:bookmark text:name="p-rc_45b7257020054464-67"/>Monitor the entry of results and, if necessary, modify them or enter director-awarded <text:tab/>scores. </text:p>
          </text:list-item>
          <text:list-item>
            <text:p text:style-name="P6"><text:bookmark text:name="p-rc_45b7257020054464-68"/>Generate and print the ranking, including partial ones. </text:p>
          </text:list-item>
          <text:list-item>
            <text:p text:style-name="P6"><text:bookmark text:name="p-rc_45b7257020054464-69"/>Check the details of the results (scores, percentages, contracts, leads) per board <text:tab/>and per pair. </text:p>
          </text:list-item>
          <text:list-item>
            <text:p text:style-name="P6"><text:bookmark text:name="p-rc_45b7257020054464-70"/>Check the scores for each board. </text:p>
          </text:list-item>
          <text:list-item>
            <text:p text:style-name="P6"><text:bookmark text:name="p-rc_45b7257020054464-71"/>Check the time taken by players for each hand. </text:p>
          </text:list-item>
          <text:list-item>
            <text:p text:style-name="P6"><text:bookmark text:name="p-rc_45b7257020054464-72"/>View the images of the boards if the option to photograph the hands was chosen. </text:p>
          </text:list-item>
          <text:list-item>
            <text:p text:style-name="P6"><text:bookmark text:name="p-rc_45b7257020054464-73"/>View the hand diagrams with related Double-Dummy analysis, if the option for hand <text:tab/>editing was chosen. </text:p>
          </text:list-item>
          <text:list-item>
            <text:p text:style-name="P6"><text:bookmark text:name="p-rc_45b7257020054464-74"/>Delete the last round. </text:p>
          </text:list-item>
          <text:list-item>
            <text:p text:style-name="P6"><text:bookmark text:name="p-rc_45b7257020054464-75"/>Delete a tournament. </text:p>
          </text:list-item>
          <text:list-item>
            <text:p text:style-name="P6"><text:bookmark text:name="p-rc_45b7257020054464-76"/>Close a tournament, freezing the results. </text:p>
          </text:list-item>
        </text:list>
        <text:p text:style-name="P5"><text:bookmark text:name="p-rc_45b7257020054464-77"/>The auxiliary features: "<text:span text:style-name="T2">Force new round</text:span>" and "<text:span text:style-name="T2">Manual entry</text:span>" are designed to allow the use of this program even with data collected via paper scoresheets. Each closed tournament remains archived in the database and can always be consulted or even reopened. </text:p>
        <text:p text:style-name="P2"><text:bookmark text:name="p-rc_45b7257020054464-78"/>The program makes use of advanced and proprietary Howell movement tables that take into account the orderly rotation of boards at the tables, minimal player movement, and optimal balancing of pairs for each hand. To leverage this last property, the "<text:span text:style-name="T2">Reorder Registrants</text:span>" feature has been included in the program. With this, registered pairs are reordered according to their rating, and consequently, the average strength of the players on the two lines is exactly balanced. </text:p>
        <text:p text:style-name="P2"/>
        <text:h text:style-name="P17" text:outline-level="3">Registration Module</text:h>
        <text:p text:style-name="P2">By accessing the registration module, you can:</text:p>
        <text:list xml:id="list5518985215533882779" text:style-name="L2">
          <text:list-item>
            <text:p text:style-name="P8"><text:bookmark text:name="p-rc_45b7257020054464-79"/>Select the tournament in which you want to participate. </text:p>
          </text:list-item>
          <text:list-item>
            <text:p text:style-name="P9"><text:bookmark text:name="p-rc_45b7257020054464-80"/>Check the list of registrants. </text:p>
          </text:list-item>
          <text:list-item>
            <text:p text:style-name="P9"><text:bookmark text:name="p-rc_45b7257020054464-81"/>Register a pair. </text:p>
          </text:list-item>
          <text:list-item>
            <text:p text:style-name="P9"><text:bookmark text:name="p-rc_45b7257020054464-82"/>Cancel a pair. </text:p>
          </text:list-item>
        </text:list>
        <text:p text:style-name="P2"><text:bookmark text:name="p-rc_45b7257020054464-83"/><text:soft-page-break/>You can register individually by entering a "*" in place of the second name. Those who wish to pair up with the individually registered people can enter their own name in place of the asterisk. </text:p>
        <text:p text:style-name="P2"/>
        <text:h text:style-name="P17" text:outline-level="3">Game Module</text:h>
        <text:p text:style-name="P2"><text:bookmark text:name="p-rc_45b7257020054464-84"/>At the beginning of the tournament, a tablet/mobile phone, set up for the current tournament and the table number, must be available at each table. The game module allows the player using it, usually the one positioned in SOUTH, to perform the following operations: </text:p>
        <text:list xml:id="list827626906142954343" text:style-name="L3">
          <text:list-item>
            <text:p text:style-name="P13"><text:bookmark text:name="p-rc_45b7257020054464-85"/>View information regarding the round number, table, opponents, boards to be played, <text:tab/>and playing line. </text:p>
          </text:list-item>
          <text:list-item>
            <text:p text:style-name="P11"><text:bookmark text:name="p-rc_45b7257020054464-86"/>By clicking on the number of the board played, enter data regarding the contract <text:tab/>(possibly doubled or redoubled), who is declaring it, the number of tricks made over <text:tab/>or under, and the opening lead. </text:p>
          </text:list-item>
          <text:list-item>
            <text:p text:style-name="P11"><text:bookmark text:name="p-rc_45b7257020054464-87"/>Calculate the scores and accept them. </text:p>
          </text:list-item>
          <text:list-item>
            <text:p text:style-name="P11"><text:bookmark text:name="p-rc_45b7257020054464-88"/>Photograph or, better yet, edit the hand to perform checks and analyses. </text:p>
          </text:list-item>
          <text:list-item>
            <text:p text:style-name="P11"><text:bookmark text:name="p-rc_45b7257020054464-89"/>Check previous results at other tables. </text:p>
          </text:list-item>
          <text:list-item>
            <text:p text:style-name="P11"><text:bookmark text:name="p-rc_45b7257020054464-90"/>See the movement to be performed in the next round. </text:p>
          </text:list-item>
        </text:list>
        <text:p text:style-name="P10"><text:bookmark text:name="p-rc_45b7257020054464-91"/>When the last score of the round is recorded, a written and vocal message notifies <text:tab/>that the round is finished. Everyone must press the "Update/Check" button to <text:tab/>refresh the page data. At the end of the tournament, buttons are made available that <text:tab/>allow you to: </text:p>
        <text:list xml:id="list8201483258665973232" text:style-name="L4">
          <text:list-item>
            <text:p text:style-name="P12"><text:bookmark text:name="p-rc_45b7257020054464-92"/>View the ranking. </text:p>
          </text:list-item>
          <text:list-item>
            <text:p text:style-name="P12"><text:bookmark text:name="p-rc_45b7257020054464-93"/>View the scores for each board. </text:p>
          </text:list-item>
          <text:list-item>
            <text:p text:style-name="P12"><text:bookmark text:name="p-rc_45b7257020054464-94"/>Check all partial results for each pair and each board in a summary format. </text:p>
          </text:list-item>
          <text:list-item>
            <text:p text:style-name="P12"><text:bookmark text:name="p-rc_45b7257020054464-95"/>View any photos taken of the hands. </text:p>
          </text:list-item>
          <text:list-item>
            <text:p text:style-name="P12"><text:bookmark text:name="p-rc_45b7257020054464-96"/>View the schemes of the edited boards and related analyses. </text:p>
          </text:list-item>
          <text:list-item>
            <text:p text:style-name="P12"><text:bookmark text:name="p-rc_45b7257020054464-97"/>View the time taken to play the hands, round by round. </text:p>
          </text:list-item>
        </text:list>
        <text:p text:style-name="P10"><text:bookmark text:name="p-rc_45b7257020054464-98"/>The game module, in addition to allowing access to the current tournament, also <text:tab/>allows you to see the data of all archived tournaments. </text:p>
        <text:p text:style-name="P10"/>
        <text:h text:style-name="P17" text:outline-level="3">Note on Scoring Type</text:h>
        <text:p text:style-name="P2"><text:bookmark text:name="p-rc_45b7257020054464-99"/>When defining the tournament, the type of scoring adopted is specified: </text:p>
        <text:list xml:id="list2792750616510432632" text:style-name="L5">
          <text:list-item>
            <text:p text:style-name="P15"><text:bookmark text:name="p-rc_45b7257020054464-100"/><text:span text:style-name="T1">MP:</text:span> percentage of Match Points relative to the theoretical maximum. </text:p>
          </text:list-item>
          <text:list-item>
            <text:p text:style-name="P14"><text:bookmark text:name="p-rc_45b7257020054464-101"/><text:span text:style-name="T1">IMP:</text:span> International Match Points. </text:p>
          </text:list-item>
          <text:list-item>
            <text:p text:style-name="P16"><text:bookmark text:name="p-rc_45b7257020054464-102"/><text:span text:style-name="T1">POM:</text:span> Points Of Merit. </text:p>
            <text:p text:style-name="P14"><text:span text:style-name="T3"><text:s text:c="2"/></text:span><text:a xlink:type="simple" xlink:href="http://www.lamongolfiera.mb.it/wp-content/uploads/2019/05/Punteggio-di-merito1.pdf" text:style-name="Internet_20_link" text:visited-style-name="Visited_20_Internet_20_Link"><text:span text:style-name="T3">http://www.lamongolfiera.mb.it/wp-content/uploads/2019/05/Punteggio-di-merito1.pdf</text:span></text:a><text:span text:style-name="T3">)</text:span></text:p>
          </text:list-item>
          <text:list-item>
            <text:p text:style-name="P14"><text:bookmark text:name="p-rc_45b7257020054464-103"/><text:span text:style-name="T1">DMP:</text:span> Distributional Match Points. </text:p>
            <text:p text:style-name="P1"><text:span text:style-name="T3"><text:s text:c="2"/></text:span><text:a xlink:type="simple" xlink:href="http://www.lamongolfiera.mb.it/wp-content/uploads/2021/12/Il-punteggio-nel-bridgeR2.pdf" text:style-name="Internet_20_link" text:visited-style-name="Visited_20_Internet_20_Link"><text:span text:style-name="T3">http://www.lamongolfiera.mb.it/wp-content/uploads/2021/12/Il-punteggio-nel-bridgeR2.pdf</text:span></text:a></text:p>
            <text:p text:style-name="P1"><text:span text:style-name="T3"/></text:p>
          </text:list-item>
        </text:list>
        <text:p text:style-name="P4"><text:bookmark text:name="p-rc_45b7257020054464-104"/>In this release, players can view the ranking based on all four of these criteria, but in the next one, they will only be able to see the one defined by the Tournament Director.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Orsucci</meta:initial-creator>
    <meta:creation-date>2026-06-24T15:45:47.08</meta:creation-date>
    <meta:document-statistic meta:table-count="0" meta:image-count="0" meta:object-count="0" meta:page-count="2" meta:paragraph-count="51" meta:word-count="736" meta:character-count="4488"/>
    <dc:date>2026-06-24T16:05:14.71</dc:date>
    <dc:creator>Antonio Orsucci</dc:creator>
    <meta:editing-duration>PT19M27S</meta:editing-duration>
    <meta:editing-cycles>1</meta:editing-cycles>
    <meta:generator>OpenOffice/4.1.8$Win32 OpenOffice.org_project/418m3$Build-9803</meta:generator>
  </office:meta>
</office:document-meta>
</file>